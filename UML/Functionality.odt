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5d4c" officeooo:paragraph-rsid="00175d4c"/>
    </style:style>
    <style:style style:name="P2" style:family="paragraph" style:parent-style-name="Heading_20_2">
      <style:text-properties officeooo:rsid="00175d4c" officeooo:paragraph-rsid="00175d4c"/>
    </style:style>
    <style:style style:name="P3" style:family="paragraph" style:parent-style-name="Text_20_body" style:list-style-name="L1">
      <style:text-properties officeooo:rsid="0018baca" officeooo:paragraph-rsid="0018baca"/>
    </style:style>
    <style:style style:name="P4" style:family="paragraph" style:parent-style-name="Text_20_body" style:list-style-name="L1">
      <style:text-properties officeooo:rsid="001aa1b4" officeooo:paragraph-rsid="001aa1b4"/>
    </style:style>
    <style:style style:name="P5" style:family="paragraph" style:parent-style-name="Text_20_body" style:list-style-name="L1">
      <style:text-properties officeooo:rsid="001b5a5d" officeooo:paragraph-rsid="001b5a5d"/>
    </style:style>
    <style:style style:name="T1" style:family="text">
      <style:text-properties officeooo:rsid="001b5a5d"/>
    </style:style>
    <style:style style:name="T2" style:family="text">
      <style:text-properties officeooo:rsid="001cc2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Man ( Your Password Manager )</text:h>
      <text:h text:style-name="P2" text:outline-level="2">Functionality</text:h>
      <text:list text:style-name="L1">
        <text:list-item>
          <text:p text:style-name="P3">A user can</text:p>
          <text:list>
            <text:list-item>
              <text:p text:style-name="P3">sign-up</text:p>
            </text:list-item>
            <text:list-item>
              <text:p text:style-name="P3">log-in</text:p>
            </text:list-item>
            <text:list-item>
              <text:p text:style-name="P3">register an organization</text:p>
            </text:list-item>
          </text:list>
        </text:list-item>
        <text:list-item>
          <text:p text:style-name="P4">Admin is a special user who manage<text:span text:style-name="T1">s</text:span> organization(s)</text:p>
          <text:list>
            <text:list-item>
              <text:p text:style-name="P4">admin can add organizations</text:p>
            </text:list-item>
            <text:list-item>
              <text:p text:style-name="P4">An admin can add users to an organization he manages</text:p>
            </text:list-item>
          </text:list>
        </text:list-item>
        <text:list-item>
          <text:p text:style-name="P4">users can add services</text:p>
        </text:list-item>
        <text:list-item>
          <text:p text:style-name="P5">Services can be:</text:p>
          <text:list>
            <text:list-item>
              <text:p text:style-name="P4">Services have servicename, <text:span text:style-name="T2">Data and Tokens</text:span></text:p>
              <text:list>
                <text:list-item>
                  <text:p text:style-name="P4">Data <text:span text:style-name="T2">has </text:span><text:span text:style-name="T1">username and password</text:span></text:p>
                </text:list-item>
                <text:list-item>
                  <text:p text:style-name="P5"><text:span text:style-name="T2">Tokens can have </text:span>tokenname and token</text:p>
                </text:list-item>
              </text:list>
            </text:list-item>
          </text:list>
        </text:list-item>
        <text:list-item>
          <text:p text:style-name="P4">Renderer takes a PassMan object and renders the current stat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7:37:31.926999366</meta:creation-date>
    <dc:date>2026-06-16T20:04:52.541055377</dc:date>
    <meta:editing-duration>P1DT18H28M7S</meta:editing-duration>
    <meta:editing-cycles>3</meta:editing-cycles>
    <meta:generator>LibreOffice/25.8.7.3$Linux_X86_64 LibreOffice_project/d7b8600dfe4e9dbeb18e6240c1ae9939a7c755a9</meta:generator>
    <meta:document-statistic meta:table-count="0" meta:image-count="0" meta:object-count="0" meta:page-count="1" meta:paragraph-count="15" meta:word-count="84" meta:character-count="442" meta:non-whitespace-character-count="386"/>
  </office:meta>
</office:document-meta>
</file>